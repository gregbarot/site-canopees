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3054c" officeooo:paragraph-rsid="0013054c" style:font-weight-asian="bold" style:font-weight-complex="bold"/>
    </style:style>
    <style:style style:name="P2" style:family="paragraph" style:parent-style-name="Text_20_body">
      <style:text-properties fo:font-weight="bold" officeooo:rsid="0014b4fb" officeooo:paragraph-rsid="0014b4fb" style:font-weight-asian="bold" style:font-weight-complex="bold"/>
    </style:style>
    <style:style style:name="P3" style:family="paragraph" style:parent-style-name="Text_20_body">
      <style:text-properties style:text-underline-style="none" fo:font-weight="normal" officeooo:rsid="0013054c" officeooo:paragraph-rsid="0013054c" style:font-weight-asian="normal" style:font-weight-complex="normal"/>
    </style:style>
    <style:style style:name="P4" style:family="paragraph" style:parent-style-name="Text_20_body">
      <style:text-properties officeooo:rsid="0014b4fb" officeooo:paragraph-rsid="0013054c"/>
    </style:style>
    <style:style style:name="P5" style:family="paragraph" style:parent-style-name="Text_20_body">
      <style:text-properties officeooo:rsid="0014b4fb" officeooo:paragraph-rsid="0014b4fb"/>
    </style:style>
    <style:style style:name="P6" style:family="paragraph" style:parent-style-name="Text_20_body">
      <style:text-properties officeooo:paragraph-rsid="0014b4fb"/>
    </style:style>
    <style:style style:name="P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fo:font-weight="bold" officeooo:rsid="0013054c" officeooo:paragraph-rsid="0013054c" style:font-weight-asian="bold" style:font-weight-complex="bold"/>
    </style:style>
    <style:style style:name="P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14b4fb"/>
    </style:style>
    <style:style style:name="P9"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14b4fb"/>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054c"/>
    </style:style>
    <style:style style:name="P1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054c" officeooo:paragraph-rsid="0013054c"/>
    </style:style>
    <style:style style:name="P12" style:family="paragraph" style:parent-style-name="Standard">
      <style:text-properties officeooo:rsid="0013054c" officeooo:paragraph-rsid="0013054c"/>
    </style:style>
    <style:style style:name="P13" style:family="paragraph" style:parent-style-name="Standard">
      <style:text-properties style:text-underline-style="solid" style:text-underline-width="auto" style:text-underline-color="font-color" fo:font-weight="bold" officeooo:rsid="0013054c" officeooo:paragraph-rsid="0013054c" style:font-weight-asian="bold" style:font-weight-complex="bold"/>
    </style:style>
    <style:style style:name="P14" style:family="paragraph" style:parent-style-name="Standard">
      <style:text-properties officeooo:rsid="0014b4fb" officeooo:paragraph-rsid="0014b4fb"/>
    </style:style>
    <style:style style:name="P15" style:family="paragraph" style:parent-style-name="Text_20_body">
      <style:text-properties fo:font-weight="normal" officeooo:rsid="0014b4fb" officeooo:paragraph-rsid="0014b4fb" style:font-weight-asian="normal" style:font-weight-complex="normal"/>
    </style:style>
    <style:style style:name="P16" style:family="paragraph" style:parent-style-name="Text_20_body">
      <style:text-properties style:text-underline-style="solid" style:text-underline-width="auto" style:text-underline-color="font-color" fo:font-weight="bold" officeooo:rsid="0013054c" officeooo:paragraph-rsid="0013054c"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1645fc" officeooo:paragraph-rsid="001645fc" style:font-weight-asian="bold" style:font-weight-complex="bold"/>
    </style:style>
    <style:style style:name="P18" style:family="paragraph" style:parent-style-name="Text_20_body">
      <style:text-properties style:text-underline-style="none" fo:font-weight="normal" officeooo:rsid="0013054c" officeooo:paragraph-rsid="0013054c" style:font-weight-asian="normal" style:font-weight-complex="normal"/>
    </style:style>
    <style:style style:name="T1" style:family="text">
      <style:text-properties officeooo:rsid="0014b4fb"/>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histoire de Canopées Version Courte</text:p>
      <text:p text:style-name="P3">Fondée en 2020 par Bob et Tom, deux passionnés de nature, Canopées est née d’une volonté commune : redonner aux espaces verts leur rôle essentiel dans notre quotidien. Inspiré de la « canopée », cette couche supérieure des forêts où la vie est la plus dense, le nom de l’entreprise symbolise protection, équilibre et vitalité.</text:p>
      <text:p text:style-name="Text_20_body">Canopées accompagne particuliers, professionnels et collectivités dans la conception, la création et l’entretien d’espaces verts. De l’aménagement paysager à la taille, l’élagage ou l’abattage, chaque intervention est pensée avec soin et respect du vivant.</text:p>
      <text:p text:style-name="Text_20_body">Engagée dans une démarche durable, l’entreprise valorise ses déchets verts, notamment par le compostage, afin de limiter son impact environnemental. Portée par la complémentarité de ses fondateurs, Canopées crée des espaces harmonieux, vivants et durables, en accord avec les besoins de chacun et les équilibres naturels.</text:p>
      <text:p text:style-name="P1"/>
      <text:p text:style-name="P1"/>
      <text:p text:style-name="P1">L'histoire de Canopées V2.</text:p>
      <text:p text:style-name="P3"/>
      <text:p text:style-name="P3">La société Canopées est née en 2020 de la rencontre entre deux passionnés de nature, Bob et Tom. Amis de longue date, ils partageaient une conviction forte : les espaces verts ne sont pas seulement des éléments décoratifs, mais de véritables lieux de vie, essentiels au bien-être et à l’équilibre des environnements urbains et ruraux.</text:p>
      <text:p text:style-name="Text_20_body">C’est en réfléchissant à l’identité de leur entreprise qu’ils ont choisi le nom « Canopées ». En écologie, la canopée désigne la couche supérieure des forêts, formée par les cimes des arbres, là où la vie est la plus dense et où la lumière nourrit l’ensemble de l’écosystème. Le mot lui-même trouve son origine dans le latin médiéval <text:span text:style-name="Emphasis">canopeum</text:span>, issu du grec ancien <text:span text:style-name="Emphasis">kōnōpeion</text:span>, qui signifiait « voile » ou « protection contre le soleil ». Pour Bob et Tom, ce terme s’est imposé comme une évidence : il symbolise à la fois la protection, la vitalité et l’harmonie naturelle qu’ils souhaitent insuffler dans chacun de leurs projets. La canopée devient alors une métaphore de leur mission : créer des espaces vivants, équilibrés et durables, où chaque élément trouve sa place.</text:p>
      <text:p text:style-name="Text_20_body">Animés par cette vision, ils ont décidé de créer une entreprise capable d’accompagner particuliers, professionnels et collectivités territoriales dans la conception, la création et l’entretien de leurs espaces extérieurs. Dès ses débuts, Canopées s’est distinguée par une approche à la fois technique et sensible, mêlant savoir-faire paysager et respect profond du vivant.</text:p>
      <text:p text:style-name="Text_20_body">Au fil des projets, la société a développé une expertise complète couvrant l’ensemble des besoins liés aux espaces verts. De la conception sur mesure de jardins et d’aménagements paysagers à leur réalisation concrète, Canopées s’engage à créer des espaces harmonieux, durables et adaptés à chaque client. L’entretien régulier des espaces verts constitue également un pilier de son activité, garantissant la pérennité et la qualité des aménagements réalisés.</text:p>
      <text:p text:style-name="Text_20_body">L’entreprise intervient aussi dans des opérations plus techniques telles que la taille des haies, l’élagage ou encore l’abattage d’arbres, toujours dans le respect des règles de sécurité et de l’équilibre écologique. Chaque intervention est pensée pour préserver la santé des végétaux et favoriser la biodiversité.</text:p>
      <text:p text:style-name="Text_20_body">Fidèle à ses valeurs fondatrices, Canopées a intégré très tôt une démarche écoresponsable dans son fonctionnement. La valorisation des déchets verts, notamment par le compostage, s’inscrit au cœur de son identité. Cette approche permet de limiter l’impact environnemental de ses activités tout en participant à un cycle vertueux de réutilisation des matières organiques.</text:p>
      <text:p text:style-name="Text_20_body">Aujourd’hui, Canopées incarne une entreprise engagée, qui place la nature au centre de ses <text:soft-page-break/>préoccupations et qui œuvre chaque jour pour créer des espaces verts durables, vivants et porteurs de sens.</text:p>
      <text:p text:style-name="P7"/>
      <text:p text:style-name="P1"/>
      <text:p text:style-name="P1"/>
      <text:p text:style-name="P1">L'histoire de la société Canopées. V1</text:p>
      <text:p text:style-name="Text_20_body"/>
      <text:p text:style-name="Text_20_body">La société Canopées est née en 2020 de la rencontre entre deux passionnés de nature, Bob et Tom. Amis de longue date, ils partageaient une conviction forte : les espaces verts ne sont pas seulement des éléments décoratifs, mais de véritables lieux de vie, essentiels au bien-être et à l’équilibre des environnements urbains et ruraux.</text:p>
      <text:p text:style-name="Text_20_body">Animés par cette vision, ils ont décidé de créer une entreprise capable d’accompagner particuliers, professionnels et collectivités territoriales dans la conception, la création et l’entretien de leurs espaces extérieurs. Dès ses débuts, Canopées s’est distinguée par une approche à la fois technique et sensible, mêlant savoir-faire paysager et respect profond du vivant.</text:p>
      <text:p text:style-name="Text_20_body">Au fil des projets, la société a développé une expertise complète couvrant l’ensemble des besoins liés aux espaces verts. De la conception sur mesure de jardins et d’aménagements paysagers à leur réalisation concrète, Canopées s’engage à créer des espaces harmonieux, durables et adaptés à chaque client. L’entretien régulier des espaces verts constitue également un pilier de son activité, garantissant la pérennité et la qualité des aménagements réalisés.</text:p>
      <text:p text:style-name="Text_20_body">L’entreprise intervient aussi dans des opérations plus techniques telles que la taille des haies, l’élagage ou encore l’abattage d’arbres, toujours dans le respect des règles de sécurité et de l’équilibre écologique. Chaque intervention est pensée pour préserver la santé des végétaux et favoriser la biodiversité.</text:p>
      <text:p text:style-name="Text_20_body">Fidèle à ses valeurs fondatrices, Canopées a intégré très tôt une démarche écoresponsable dans son fonctionnement. La valorisation des déchets verts, notamment par le compostage, s’inscrit au cœur de sa charte graphique et de son identité. Cette approche permet de limiter l’impact environnemental de ses activités tout en participant à un cycle vertueux de réutilisation des matières organiques.</text:p>
      <text:p text:style-name="Text_20_body">Aujourd’hui, Canopées incarne une entreprise engagée, qui place la nature au centre de ses préoccupations et qui œuvre chaque jour pour créer des espaces verts durables, vivants et porteurs de sens.</text:p>
      <text:p text:style-name="Standard"/>
      <text:p text:style-name="P10"/>
      <text:p text:style-name="P12"/>
      <text:p text:style-name="P13">Ca veut dire quoi Canopée ?</text:p>
      <text:p text:style-name="P12"/>
      <text:p text:style-name="P12">Le terme « canopée » désigne, en écologie, la couche supérieure des forêts formée par l’ensemble des cimes des arbres, là où se concentre une grande partie de la biodiversité et des échanges avec la lumière. Le mot trouve son origine dans le latin médiéval <text:span text:style-name="Emphasis">canopeum</text:span>, lui-même issu du grec ancien <text:span text:style-name="Emphasis">kōnōpeion</text:span>, qui signifiait « moustiquaire » ou « voile protégeant du soleil ». Par extension, ce terme évoque une couverture protectrice, une sorte de toit naturel formé par le feuillage des arbres. Aujourd’hui, « canopée » est devenu un symbole fort dans le domaine de l’aménagement paysager et de l’environnement : il renvoie à l’idée de protection, d’équilibre écologique et de vie foisonnante, des valeurs qui inspirent directement l’identité et les engagements d’une entreprise comme Canopées. </text:p>
      <text:p text:style-name="P11"/>
      <text:p text:style-name="P12"><text:soft-page-break/></text:p>
      <text:p text:style-name="P4"><text:span text:style-name="Strong_20_Emphasis">Biographie de Bob. Version Longue</text:span></text:p>
      <text:p text:style-name="Text_20_body">Bob a grandi au contact direct de la nature, dans un environnement où les saisons rythmaient le quotidien. Très tôt, il développe une sensibilité particulière pour les paysages, les plantes et les équilibres naturels. Observateur et réfléchi, il passe des heures à comprendre comment les éléments interagissent entre eux : la lumière, le sol, l’eau, le vent. Cette curiosité devient peu à peu une véritable compétence.</text:p>
      <text:p text:style-name="Text_20_body">Attiré par la création concrète, Bob s’oriente naturellement vers les métiers du paysage. Il se forme à la conception et à l’aménagement d’espaces verts, avec une approche presque architecturale du jardin. Pour lui, chaque projet est une composition : il pense les volumes, les perspectives, les circulations, mais aussi l’évolution du lieu dans le temps. Son regard est précis, structuré, et toujours guidé par une recherche d’harmonie.</text:p>
      <text:p text:style-name="Text_20_body">Mais au-delà de la technique, Bob est profondément attaché au respect du vivant. Il privilégie des solutions durables, choisit des essences adaptées et réfléchit à l’impact de chaque intervention. Il est également à l’origine de la démarche de valorisation des déchets verts au sein de Canopées, convaincu que rien ne doit être perdu et que tout peut être réintégré dans un cycle naturel.</text:p>
      <text:p text:style-name="Text_20_body">Calme, posé et méthodique, Bob apporte au duo une vision globale et une grande rigueur. Il incarne la dimension stratégique et créative de l’entreprise, en veillant à ce que chaque espace conçu soit à la fois esthétique, fonctionnel et respectueux de son environnement.</text:p>
      <text:p text:style-name="P9"/>
      <text:p text:style-name="P2"><text:span text:style-name="Strong_20_Emphasis"><text:span text:style-name="T3">Biographie de Bob (≈200 mots)</text:span></text:span></text:p>
      <text:p text:style-name="P15">Bob a grandi au plus près de la nature, développant très tôt une sensibilité aux paysages et aux équilibres naturels. Observateur et réfléchi, il s’est passionné pour la manière dont les éléments interagissent : lumière, sol, eau et végétation. Cette curiosité l’a naturellement conduit vers les métiers du paysage, où il s’est spécialisé dans la conception et l’aménagement d’espaces verts.</text:p>
      <text:p text:style-name="Text_20_body">Doté d’une approche structurée, Bob imagine chaque projet comme une véritable composition. Il pense les volumes, les perspectives et l’évolution des espaces dans le temps, avec une attention particulière portée à l’harmonie et à la durabilité. Son regard allie esthétique et fonctionnalité, toujours guidé par le respect du vivant.</text:p>
      <text:p text:style-name="Text_20_body">Engagé dans une démarche responsable, il privilégie des solutions durables et adaptées à chaque environnement. Il accorde également une grande importance à la valorisation des déchets verts, notamment par le compostage, convaincu de la nécessité de préserver les ressources naturelles.</text:p>
      <text:p text:style-name="Text_20_body">Calme, méthodique et créatif, Bob apporte une vision globale et cohérente à chaque projet. Il incarne une approche sensible et réfléchie du paysage, où chaque espace devient un lieu vivant, équilibré et durable.</text:p>
      <text:p text:style-name="P9"/>
      <text:p text:style-name="P6"><text:span text:style-name="Strong_20_Emphasis">Biographie de Tom. </text:span><text:span text:style-name="Strong_20_Emphasis"><text:span text:style-name="T1">Version Longue.</text:span></text:span></text:p>
      <text:p text:style-name="Text_20_body">Tom a grandi dans un environnement où le contact avec l’extérieur faisait partie du quotidien. Très jeune, il développe un goût marqué pour les activités manuelles et le travail en plein air. Curieux et volontaire, il passe beaucoup de temps à observer les gestes des professionnels et à expérimenter par lui-même, apprenant progressivement à comprendre les réactions des végétaux et les exigences du terrain.</text:p>
      <text:p text:style-name="Text_20_body">Attiré par l’action et le concret, Tom s’oriente naturellement vers les métiers liés à l’entretien et à la gestion des espaces verts. Il se forme aux techniques de taille, d’élagage et d’abattage, tout en développant une connaissance approfondie des arbres et des plantes. Avec l’expérience, il acquiert une véritable capacité d’analyse : il sait diagnostiquer l’état d’un végétal, anticiper son évolution et <text:soft-page-break/>intervenir de manière adaptée, toujours dans le respect de son équilibre.</text:p>
      <text:p text:style-name="Text_20_body">Sur le terrain, Tom se distingue par sa précision et son efficacité. Il maîtrise les outils, applique des gestes sûrs et veille en permanence à la sécurité des interventions. Son approche est pragmatique : il sait s’adapter aux contraintes réelles, qu’elles soient techniques, environnementales ou humaines, afin de garantir des résultats durables et de qualité.</text:p>
      <text:p text:style-name="Text_20_body">Doté d’un excellent sens du relationnel, Tom accorde une grande importance à l’écoute et à la compréhension des besoins. Il prend le temps d’échanger, de conseiller et d’expliquer ses choix, créant ainsi une relation de confiance avec les personnes qu’il accompagne. Cette proximité lui permet de proposer des solutions adaptées, à la fois réalistes et respectueuses des attentes.</text:p>
      <text:p text:style-name="Text_20_body">Énergique, engagé et rigoureux, Tom incarne une approche directe et authentique du métier. Son attachement au travail bien fait et au respect du vivant s’inscrit pleinement dans une démarche durable, où chaque intervention contribue à préserver et valoriser les espaces naturels.</text:p>
      <text:p text:style-name="P8"><text:span text:style-name="Strong_20_Emphasis"/></text:p>
      <text:p text:style-name="P6"><text:span text:style-name="Strong_20_Emphasis"/></text:p>
      <text:p text:style-name="P6"><text:span text:style-name="Strong_20_Emphasis"/></text:p>
      <text:p text:style-name="P6"><text:span text:style-name="Strong_20_Emphasis">Biographie de Tom (≈200 mots</text:span><text:span text:style-name="Strong_20_Emphasis"><text:span text:style-name="T1">)</text:span></text:span></text:p>
      <text:p text:style-name="P6"><text:span text:style-name="Strong_20_Emphasis"><text:span text:style-name="T2">Tom a grandi en lien direct avec le terrain, développant très jeune un goût pour les activités extérieures et le travail manuel. Curieux et dynamique, il apprend en observant, en expérimentant et en pratiquant, ce qui lui permet d’acquérir rapidement une solide compréhension des végétaux et de leur environnement.</text:span></text:span></text:p>
      <text:p text:style-name="Text_20_body">Naturellement attiré par l’action, il se spécialise dans l’entretien et la gestion des espaces verts. Il se forme aux techniques de taille, d’élagage et d’abattage, tout en développant une connaissance fine des arbres et de leur évolution. Avec l’expérience, il sait analyser l’état d’un végétal et adapter ses interventions avec précision et respect.</text:p>
      <text:p text:style-name="Text_20_body">Sur le terrain, Tom se distingue par son efficacité et sa rigueur. Il maîtrise les outils, applique des gestes sûrs et s’adapte aux contraintes techniques comme environnementales. Son approche est concrète et pragmatique, toujours orientée vers des résultats durables.</text:p>
      <text:p text:style-name="Text_20_body">Attentif aux besoins, il accorde une grande importance à l’écoute et au conseil. Son sens du contact lui permet de créer une relation de confiance et de proposer des solutions adaptées.</text:p>
      <text:p text:style-name="Text_20_body">Énergique et engagé, Tom incarne une approche directe et responsable, au service d’espaces naturels préservés et valorisés.</text:p>
      <text:p text:style-name="P8"><text:span text:style-name="Strong_20_Emphasis"/></text:p>
      <text:p text:style-name="P6"><text:span text:style-name="Strong_20_Emphasis"/></text:p>
      <text:p text:style-name="P5"><text:span text:style-name="Strong_20_Emphasis">Un duo complémentaire</text:span></text:p>
      <text:p text:style-name="Text_20_body">Si Bob et Tom sont différents dans leur manière d’aborder leur métier, ils partagent des valeurs communes fortes : le respect de la nature, le sens du travail bien fait et la volonté de créer des espaces durables et vivants. Là où Bob imagine et structure, Tom réalise et ajuste. Leur complémentarité est au cœur de la réussite de Canopées, donnant naissance à des projets à la fois réfléchis, maîtrisés et profondément ancrés dans le réel.</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meta:editing-duration>
    <meta:editing-cycles>6</meta:editing-cycles>
    <meta:generator>LibreOffice/5.3.7.2$Windows_X86_64 LibreOffice_project/6b8ed514a9f8b44d37a1b96673cbbdd077e24059</meta:generator>
    <dc:date>2026-04-20T12:30:56.777000000</dc:date>
    <meta:document-statistic meta:table-count="0" meta:image-count="0" meta:object-count="0" meta:page-count="4" meta:paragraph-count="45" meta:word-count="2025" meta:character-count="13179" meta:non-whitespace-character-count="11198"/>
    <meta:user-defined meta:name="Info 1"/>
    <meta:user-defined meta:name="Info 2"/>
    <meta:user-defined meta:name="Info 3"/>
    <meta:user-defined meta:name="Info 4"/>
  </office:meta>
</office:document-meta>
</file>